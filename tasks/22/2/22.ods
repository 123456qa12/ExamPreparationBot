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D процесса B</text:p>
          </table:table-cell>
          <table:table-cell office:value-type="string" table:style-name="ce2">
            <text:p>Время выполнения процесса B (мс)</text:p>
          </table:table-cell>
          <table:table-cell office:value-type="string" table:style-name="ce2">
            <text:p>ID процесса (ов) A</text:p>
          </table:table-cell>
          <table:table-cell table:number-columns-repeated="1638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3;4</text:p>
          </table:table-cell>
          <table:table-cell table:number-columns-repeated="16381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6;7</text:p>
          </table:table-cell>
          <table:table-cell table:number-columns-repeated="16381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6;7</text:p>
          </table:table-cell>
          <table:table-cell table:number-columns-repeated="1638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9;10</text:p>
          </table:table-cell>
          <table:table-cell table:number-columns-repeated="16381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2;8</text:p>
          </table:table-cell>
          <table:table-cell table:number-columns-repeated="16381"/>
        </table:table-row>
        <table:table-row table:number-rows-repeated="104856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meta:initial-creator>Денис Плюснин</meta:initial-creator>
    <dc:creator>Валентина Котельникова</dc:creator>
    <meta:creation-date>2022-09-24T20:31:04Z</meta:creation-date>
    <dc:date>2025-10-03T07:34:40Z</dc:date>
  </office:meta>
</office:document-meta>
</file>