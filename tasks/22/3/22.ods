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;2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;4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;7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6;7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9;10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;7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2;8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Денис Плюснин</meta:initial-creator>
    <dc:creator>Валентина Котельникова</dc:creator>
    <meta:creation-date>2022-09-24T20:31:04Z</meta:creation-date>
    <dc:date>2025-10-03T07:36:35Z</dc:date>
  </office:meta>
</office:document-meta>
</file>